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, serif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868in" table:align="left"/>
    </style:style>
    <style:style style:name="Table1.A" style:family="table-column">
      <style:table-column-properties style:column-width="3.0056in"/>
    </style:style>
    <style:style style:name="Table1.B" style:family="table-column">
      <style:table-column-properties style:column-width="4.081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0868in" table:align="left"/>
    </style:style>
    <style:style style:name="Table2.A" style:family="table-column">
      <style:table-column-properties style:column-width="3.1167in"/>
    </style:style>
    <style:style style:name="Table2.B" style:family="table-column">
      <style:table-column-properties style:column-width="3.970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7.0868in" table:align="left"/>
    </style:style>
    <style:style style:name="Table3.A" style:family="table-column">
      <style:table-column-properties style:column-width="2.7646in"/>
    </style:style>
    <style:style style:name="Table3.B" style:family="table-column">
      <style:table-column-properties style:column-width="4.322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0868in" table:align="left"/>
    </style:style>
    <style:style style:name="Table4.A" style:family="table-column">
      <style:table-column-properties style:column-width="1.0653in"/>
    </style:style>
    <style:style style:name="Table4.B" style:family="table-column">
      <style:table-column-properties style:column-width="3.1431in"/>
    </style:style>
    <style:style style:name="Table4.C" style:family="table-column">
      <style:table-column-properties style:column-width="2.878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7.0868in" table:align="left"/>
    </style:style>
    <style:style style:name="Table5.A" style:family="table-column">
      <style:table-column-properties style:column-width="1.1111in"/>
    </style:style>
    <style:style style:name="Table5.B" style:family="table-column">
      <style:table-column-properties style:column-width="2.7521in"/>
    </style:style>
    <style:style style:name="Table5.C" style:family="table-column">
      <style:table-column-properties style:column-width="3.223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9042in" table:align="left"/>
    </style:style>
    <style:style style:name="Table6.A" style:family="table-column">
      <style:table-column-properties style:column-width="1.0653in"/>
    </style:style>
    <style:style style:name="Table6.B" style:family="table-column">
      <style:table-column-properties style:column-width="2.291in"/>
    </style:style>
    <style:style style:name="Table6.C" style:family="table-column">
      <style:table-column-properties style:column-width="3.5479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Text_20_body" style:master-page-name="HTML">
      <style:paragraph-properties fo:margin-left="0in" fo:margin-right="0in" fo:margin-top="1.5752in" fo:margin-bottom="0.1965in" style:contextual-spacing="false" fo:text-align="center" style:justify-single-word="false" fo:text-indent="0in" style:auto-text-indent="false" style:page-number="auto"/>
    </style:style>
    <style:style style:name="P2" style:family="paragraph" style:parent-style-name="Text_20_body">
      <style:paragraph-properties fo:margin-top="1.5752in" fo:margin-bottom="0.1965in" style:contextual-spacing="false" fo:text-align="center" style:justify-single-word="false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5"/>
    <style:style style:name="P31" style:family="paragraph" style:parent-style-name="Text_20_body" style:list-style-name="L16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>
      <style:paragraph-properties fo:margin-left="0.1252in" fo:margin-right="0.1252in" fo:margin-top="0.1252in" fo:margin-bottom="0.1252in" style:contextual-spacing="false" fo:text-align="center" style:justify-single-word="false" fo:text-indent="0in" style:auto-text-indent="false"/>
    </style:style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8">
      <style:paragraph-properties fo:margin-top="0in" fo:margin-bottom="0in" style:contextual-spacing="false"/>
    </style:style>
    <style:style style:name="P37" style:family="paragraph" style:parent-style-name="Text_20_body" style:list-style-name="L18"/>
    <style:style style:name="P38" style:family="paragraph" style:parent-style-name="Text_20_body" style:list-style-name="L19">
      <style:paragraph-properties fo:margin-top="0in" fo:margin-bottom="0in" style:contextual-spacing="false"/>
    </style:style>
    <style:style style:name="P39" style:family="paragraph" style:parent-style-name="Text_20_body" style:list-style-name="L19"/>
    <style:style style:name="P40" style:family="paragraph" style:parent-style-name="Text_20_body" style:list-style-name="L20">
      <style:paragraph-properties fo:margin-top="0in" fo:margin-bottom="0in" style:contextual-spacing="false"/>
    </style:style>
    <style:style style:name="P41" style:family="paragraph" style:parent-style-name="Text_20_body" style:list-style-name="L20"/>
    <style:style style:name="P42" style:family="paragraph" style:parent-style-name="Text_20_body" style:list-style-name="L21">
      <style:paragraph-properties fo:margin-top="0in" fo:margin-bottom="0in" style:contextual-spacing="false"/>
    </style:style>
    <style:style style:name="P43" style:family="paragraph" style:parent-style-name="Text_20_body" style:list-style-name="L21"/>
    <style:style style:name="P44" style:family="paragraph" style:parent-style-name="Text_20_body">
      <style:paragraph-properties fo:margin-left="0.1252in" fo:margin-right="0.1252in" fo:margin-top="0.1252in" fo:margin-bottom="0.1252in" style:contextual-spacing="false" fo:text-align="center" style:justify-single-word="false" fo:text-indent="0in" style:auto-text-indent="false"/>
      <style:text-properties fo:color="#555555" loext:opacity="100%" fo:font-style="italic" fo:background-color="#f9f9f9" loext:padding="0.25in" loext:border="1.5pt dashed #888888"/>
    </style:style>
    <style:style style:name="P45" style:family="paragraph" style:parent-style-name="Text_20_body" style:list-style-name="L22">
      <style:paragraph-properties fo:margin-top="0in" fo:margin-bottom="0in" style:contextual-spacing="false"/>
    </style:style>
    <style:style style:name="P46" style:family="paragraph" style:parent-style-name="Text_20_body" style:list-style-name="L22"/>
    <style:style style:name="P47" style:family="paragraph" style:parent-style-name="Text_20_body" style:list-style-name="L23">
      <style:paragraph-properties fo:margin-top="0in" fo:margin-bottom="0in" style:contextual-spacing="false"/>
    </style:style>
    <style:style style:name="P48" style:family="paragraph" style:parent-style-name="Text_20_body" style:list-style-name="L23"/>
    <style:style style:name="P49" style:family="paragraph" style:parent-style-name="Text_20_body" style:list-style-name="L24">
      <style:paragraph-properties fo:margin-top="0in" fo:margin-bottom="0in" style:contextual-spacing="false"/>
    </style:style>
    <style:style style:name="P50" style:family="paragraph" style:parent-style-name="Text_20_body" style:list-style-name="L24"/>
    <style:style style:name="P51" style:family="paragraph" style:parent-style-name="Text_20_body" style:list-style-name="L25">
      <style:paragraph-properties fo:margin-top="0in" fo:margin-bottom="0in" style:contextual-spacing="false"/>
    </style:style>
    <style:style style:name="P52" style:family="paragraph" style:parent-style-name="Text_20_body" style:list-style-name="L25"/>
    <style:style style:name="P53" style:family="paragraph" style:parent-style-name="Text_20_body" style:list-style-name="L26">
      <style:paragraph-properties fo:margin-top="0in" fo:margin-bottom="0in" style:contextual-spacing="false"/>
    </style:style>
    <style:style style:name="P54" style:family="paragraph" style:parent-style-name="Text_20_body" style:list-style-name="L26"/>
    <style:style style:name="P55" style:family="paragraph" style:parent-style-name="Text_20_body" style:list-style-name="L27">
      <style:paragraph-properties fo:margin-top="0in" fo:margin-bottom="0in" style:contextual-spacing="false"/>
    </style:style>
    <style:style style:name="P56" style:family="paragraph" style:parent-style-name="Text_20_body" style:list-style-name="L27"/>
    <style:style style:name="P57" style:family="paragraph" style:parent-style-name="Preformatted_20_Text">
      <style:paragraph-properties fo:margin-top="0.7874in" fo:margin-bottom="0.1965in" style:contextual-spacing="false"/>
    </style:style>
    <style:style style:name="T1" style:family="text">
      <style:text-properties fo:color="#555555" loext:opacity="100%" fo:font-style="italic" fo:background-color="#f9f9f9" loext:char-shading-value="0" loext:padding="0.25in" loext:border="1.5pt dashed #88888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a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a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a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a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a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a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a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a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a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a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ryptoTrack</text:span></text:p>
      <text:p text:style-name="P2">System wizualizacji i analizy transakcji MetaMask Card</text:p>
      <text:p text:style-name="P2"/>
      <text:p text:style-name="P2">Artem Zakharov</text:p>
      <text:p text:style-name="P2">Przedmiot: Systemowe Projektowanie</text:p>
      <text:p text:style-name="P2">Grupa: A1</text:p>
      <text:p text:style-name="P2">Rok akademicki: 2025/2026</text:p>
      <text:p text:style-name="Heading_20_1">1. Cel projektu</text:p>
      <text:p text:style-name="Text_20_body">Celem projektu jest stworzenie funkcjonalnego oprogramowania umożliwiającego użytkownikom kart MetaMask Card śledzenie wydatków w sposób zbliżony do tradycyjnych aplikacji bankowych. Transakcje kryptowalutowe prezentowane w portfelu MetaMask są trudne do analizy pod kątem codziennych wydatków — brakuje kategoryzacji, podsumowań miesięcznych oraz przejrzystych wykresów.</text:p>
      <text:p text:style-name="Text_20_body">CryptoTrack rozwiązuje ten problem poprzez:</text:p>
      <text:list text:style-name="L1">
        <text:list-item>
          <text:p text:style-name="P3">synchronizację historii transakcji z panelu MetaMask Card (rozszerzenie Chrome), </text:p>
        </text:list-item>
        <text:list-item>
          <text:p text:style-name="P3">przechowywanie i normalizację danych w centralnej bazie PostgreSQL, </text:p>
        </text:list-item>
        <text:list-item>
          <text:p text:style-name="P3">ręczną i automatyczną (AI) kategoryzację wydatków według kategorii i podkategorii, </text:p>
        </text:list-item>
        <text:list-item>
          <text:p text:style-name="P4">dashboard, listę transakcji oraz moduł analityki z wykresami i porównaniem okresów. </text:p>
        </text:list-item>
      </text:list>
      <text:p text:style-name="Text_20_body">Ostatecznym efektem jest podniesienie świadomości finansowej użytkownika Web3 oraz ułatwienie kontroli budżetu opartego na wydatkach kartą.</text:p>
      <text:p text:style-name="Heading_20_1">2. Szczegółowy opis wymagań</text:p>
      <text:h text:style-name="Heading_20_2" text:outline-level="2">2.1. Wymagania funkcjonalne</text:h>
      <text:p text:style-name="Text_20_body"><text:span text:style-name="Strong_20_Emphasis">❖ Obsługa kont użytkowników</text:span></text:p>
      <text:list text:style-name="L2">
        <text:list-item>
          <text:p text:style-name="P5">Rejestracja i logowanie za pomocą adresu e-mail i hasła (JWT + sesje odświeżania). </text:p>
        </text:list-item>
        <text:list-item>
          <text:p text:style-name="P5">Opcjonalne logowanie portfelem Web3 (SIWE — Sign-In with Ethereum). </text:p>
        </text:list-item>
        <text:list-item>
          <text:p text:style-name="P6">Profil użytkownika: wyświetlana nazwa, powiązany adres portfela (PortfolioAccount). </text:p>
        </text:list-item>
      </text:list>
      <text:p text:style-name="Text_20_body"><text:span text:style-name="Strong_20_Emphasis">❖ Synchronizacja transakcji MetaMask Card</text:span></text:p>
      <text:list text:style-name="L3">
        <text:list-item>
          <text:p text:style-name="P7">Rozszerzenie Chrome (Plasmo) pobiera listę transakcji ze stron card.metamask.io / portfolio.metamask.io. </text:p>
        </text:list-item>
        <text:list-item>
          <text:p text:style-name="P7">Parowanie rozszerzenia z kontem użytkownika kodem 6-cyfrowym wygenerowanym w ustawieniach aplikacji web. </text:p>
        </text:list-item>
        <text:list-item>
          <text:p text:style-name="P7">Endpoint REST <text:span text:style-name="Source_20_Text">POST /api/v1/card-transactions/sync</text:span> — upsert transakcji po <text:span text:style-name="Source_20_Text">externalId</text:span>. </text:p>
        </text:list-item>
        <text:list-item>
          <text:p text:style-name="P8">Zapisywane pola: merchant, kwota fiat/crypto, status (PENDING, SETTLED, DECLINED, REFUNDED), znacznik czasu. </text:p>
        </text:list-item>
      </text:list>
      <text:p text:style-name="Text_20_body"><text:span text:style-name="Strong_20_Emphasis">❖ Zarządzanie transakcjami</text:span></text:p>
      <text:list text:style-name="L4">
        <text:list-item>
          <text:p text:style-name="P9">Lista transakcji z filtrowaniem po dacie, kategorii, merchantcie, statusie. </text:p>
        </text:list-item>
        <text:list-item>
          <text:p text:style-name="P9">Ręczna edycja kategorii, podkategorii i notatek dla pojedynczej transakcji. </text:p>
        </text:list-item>
        <text:list-item>
          <text:p text:style-name="P10">Statystyki zbiorcze: sumy wydatków, rozkład po kategoriach (<text:span text:style-name="Source_20_Text">GET /transactions/stats</text:span>). </text:p>
        </text:list-item>
      </text:list>
      <text:p text:style-name="Text_20_body"><text:span text:style-name="Strong_20_Emphasis">❖ Kategorie i podkategorie</text:span></text:p>
      <text:list text:style-name="L5">
        <text:list-item>
          <text:p text:style-name="P11">CRUD kategorii użytkownika (nazwa, kolor, ikona). </text:p>
        </text:list-item>
        <text:list-item>
          <text:p text:style-name="P11">Hierarchia parent → subcategory (np. „Jedzenie” → „Restauracje”). </text:p>
        </text:list-item>
        <text:list-item>
          <text:p text:style-name="P11">Kategorie systemowe (seed) oraz domyślne podkategorie. </text:p>
        </text:list-item>
        <text:list-item>
          <text:p text:style-name="P12">Strona „Categorize spendings” — masowa kategoryzacja merchantów. </text:p>
        </text:list-item>
      </text:list>
      <text:p text:style-name="Text_20_body"><text:span text:style-name="Strong_20_Emphasis">❖ Automatyczna kategoryzacja (AI + pamięć merchantów)</text:span></text:p>
      <text:list text:style-name="L6">
        <text:list-item>
          <text:p text:style-name="P13">Model <text:span text:style-name="Source_20_Text">CardMerchantMemory</text:span> — zapamiętanie mapowania merchantKey → kategoria po potwierdzeniu użytkownika lub AI. </text:p>
        </text:list-item>
        <text:list-item>
          <text:p text:style-name="P13">Usługa OpenAI przypisuje kategorię nieznanym merchantom (<text:span text:style-name="Source_20_Text">bulk-categorize</text:span>). </text:p>
        </text:list-item>
        <text:list-item>
          <text:p text:style-name="P14">Śledzenie przebiegu w <text:span text:style-name="Source_20_Text">CardCategorizationRun</text:span> (status, liczniki dopasowań). </text:p>
        </text:list-item>
      </text:list>
      <text:p text:style-name="Text_20_body"><text:span text:style-name="Strong_20_Emphasis">❖ Analityka i wykresy</text:span></text:p>
      <text:list text:style-name="L7">
        <text:list-item>
          <text:p text:style-name="P15">Strona Analytics: wykresy wydatków w czasie, rozkład kategorii, porównanie okresów. </text:p>
        </text:list-item>
        <text:list-item>
          <text:p text:style-name="P15">Biblioteki: Recharts, agregacja po stronie API. </text:p>
        </text:list-item>
        <text:list-item>
          <text:p text:style-name="P16">Filtr zakresu dat (DateRangePicker). </text:p>
        </text:list-item>
      </text:list>
      <text:p text:style-name="Text_20_body"><text:span text:style-name="Strong_20_Emphasis">❖ Dashboard</text:span></text:p>
      <text:list text:style-name="L8">
        <text:list-item>
          <text:p text:style-name="P17">Podsumowanie ostatnich transakcji, saldo karty (snapshot z rozszerzenia), szybki wgląd w wydatki. </text:p>
        </text:list-item>
      </text:list>
      <text:h text:style-name="Heading_20_2" text:outline-level="2">2.2. Wymagania niefunkcjonalne</text:h>
      <text:p text:style-name="Text_20_body"><text:span text:style-name="Strong_20_Emphasis">❖ Łatwość użycia</text:span></text:p>
      <text:list text:style-name="L9">
        <text:list-item>
          <text:p text:style-name="P18">Responsywny interfejs (Next.js 15, React 19, Tailwind CSS, shadcn/ui). </text:p>
        </text:list-item>
        <text:list-item>
          <text:p text:style-name="P18">Sidebar nawigacyjny: Dashboard, Transactions, Categories, Settings; widok mobilny z menu. </text:p>
        </text:list-item>
        <text:list-item>
          <text:p text:style-name="P19">Tryb jasny/ciemny (ThemeSwitcher). </text:p>
        </text:list-item>
      </text:list>
      <text:p text:style-name="Text_20_body"><text:span text:style-name="Strong_20_Emphasis">❖ Niezawodność</text:span></text:p>
      <text:list text:style-name="L10">
        <text:list-item>
          <text:p text:style-name="P20">Monorepo (pnpm, Turbo): spójne typy w pakiecie <text:span text:style-name="Source_20_Text">@crypto-tracker/shared</text:span>. </text:p>
        </text:list-item>
        <text:list-item>
          <text:p text:style-name="P20">Walidacja DTO (class-validator) i obsługa błędów HTTP w NestJS. </text:p>
        </text:list-item>
        <text:list-item>
          <text:p text:style-name="P21">Testy jednostkowe usług API (Jest). </text:p>
        </text:list-item>
      </text:list>
      <text:p text:style-name="Text_20_body"><text:span text:style-name="Strong_20_Emphasis">❖ Wydajność</text:span></text:p>
      <text:list text:style-name="L11">
        <text:list-item>
          <text:p text:style-name="P22">PostgreSQL z indeksami na <text:span text:style-name="Source_20_Text">userId</text:span>, <text:span text:style-name="Source_20_Text">timestamp</text:span>, <text:span text:style-name="Source_20_Text">categoryId</text:span>. </text:p>
        </text:list-item>
        <text:list-item>
          <text:p text:style-name="P23">Paginacja list transakcji; agregacje statystyk po stronie serwera. </text:p>
        </text:list-item>
      </text:list>
      <text:p text:style-name="Text_20_body"><text:span text:style-name="Strong_20_Emphasis">❖ Bezpieczeństwo</text:span></text:p>
      <text:list text:style-name="L12">
        <text:list-item>
          <text:p text:style-name="P24">Hasła hashowane (bcrypt); tokeny JWT krótkotrwałe + refresh w bazie (hash). </text:p>
        </text:list-item>
        <text:list-item>
          <text:p text:style-name="P24">Tokeny rozszerzenia przechowywane jako hash (<text:span text:style-name="Source_20_Text">ExtensionToken</text:span>). </text:p>
        </text:list-item>
        <text:list-item>
          <text:p text:style-name="P24">CORS i guardy autoryzacji na endpointach chronionych. </text:p>
        </text:list-item>
        <text:list-item>
          <text:p text:style-name="P25">TLS w środowisku produkcyjnym (HTTPS). </text:p>
        </text:list-item>
      </text:list>
      <text:p text:style-name="Heading_20_1">3. Ograniczenia</text:p>
      <text:h text:style-name="Heading_20_2" text:outline-level="2">3.1. Ograniczenia technologiczne</text:h>
      <text:list text:style-name="L13">
        <text:list-item>
          <text:p text:style-name="P26">Wymagane połączenie sieciowe do synchronizacji z API oraz (przy kategoryzacji AI) do OpenAI. </text:p>
        </text:list-item>
        <text:list-item>
          <text:p text:style-name="P26">Rozszerzenie działa tylko w przeglądarce Chrome/Chromium z uprawnieniami do domen MetaMask. </text:p>
        </text:list-item>
        <text:list-item>
          <text:p text:style-name="P27">Źródło danych ograniczone do transakcji MetaMask Card (nie pełna historia on-chain wszystkich sieci). </text:p>
        </text:list-item>
      </text:list>
      <text:h text:style-name="Heading_20_2" text:outline-level="2">3.2. Ograniczenia zakresu</text:h>
      <text:list text:style-name="L14">
        <text:list-item>
          <text:p text:style-name="P28">Brak wieloużytkownikowych zespołów i ról menedżerskich (aplikacja single-user per konto). </text:p>
        </text:list-item>
        <text:list-item>
          <text:p text:style-name="P29">Brak integracji z systemami płatności fiat poza danymi z karty MetaMask. </text:p>
        </text:list-item>
      </text:list>
      <text:h text:style-name="Heading_20_2" text:outline-level="2">3.3. Ograniczenia czasowe</text:h>
      <text:list text:style-name="L15">
        <text:list-item>
          <text:p text:style-name="P30">Projekt realizowany w ramach roku akademickiego 2025/2026. </text:p>
        </text:list-item>
      </text:list>
      <text:p text:style-name="Heading_20_1">4. Użytkownicy</text:p>
      <text:h text:style-name="Heading_20_2" text:outline-level="2">4.1. Kluczowy użytkownik</text:h>
      <text:p text:style-name="Text_20_body"><text:span text:style-name="Strong_20_Emphasis">❖ Użytkownik karty MetaMask (właściciel konta)</text:span> — rejestruje się, paruje rozszerzenie, synchronizuje transakcje, zarządza kategoriami, przegląda analitykę i edytuje przypisania.</text:p>
      <text:h text:style-name="Heading_20_2" text:outline-level="2">4.2. Użytkownicy techniczni</text:h>
      <text:p text:style-name="Text_20_body"><text:span text:style-name="Strong_20_Emphasis">❖ Administrator wdrożenia</text:span> — utrzymuje PostgreSQL, zmienne środowiskowe (DATABASE_URL, JWT_SECRET, OPENAI_API_KEY), deployment Docker.</text:p>
      <text:p text:style-name="Heading_20_1">5. Nazewnictwo i definicje</text:p>
      <text:list text:style-name="L16">
        <text:list-item>
          <text:p text:style-name="P31"><text:span text:style-name="Strong_20_Emphasis">Użytkownik</text:span> — osoba posiadająca konto w systemie CryptoTrack. </text:p>
        </text:list-item>
        <text:list-item>
          <text:p text:style-name="P31"><text:span text:style-name="Strong_20_Emphasis">Transakcja karty</text:span> — operacja zarejestrowana na koncie MetaMask Card (merchant, kwota, status). </text:p>
        </text:list-item>
        <text:list-item>
          <text:p text:style-name="P31"><text:span text:style-name="Strong_20_Emphasis">Merchant</text:span> — nazwa punktu handlowego (znormalizowany klucz <text:span text:style-name="Source_20_Text">merchantKey</text:span>). </text:p>
        </text:list-item>
        <text:list-item>
          <text:p text:style-name="P31"><text:span text:style-name="Strong_20_Emphasis">Kategoria / podkategoria</text:span> — etykieta klasyfikacji wydatku (hierarchia drzewiasta). </text:p>
        </text:list-item>
        <text:list-item>
          <text:p text:style-name="P31"><text:span text:style-name="Strong_20_Emphasis">Pamięć merchantów (CardMerchantMemory)</text:span> — trwałe mapowanie merchant → kategoria. </text:p>
        </text:list-item>
        <text:list-item>
          <text:p text:style-name="P31"><text:span text:style-name="Strong_20_Emphasis">Rozszerzenie Chrome</text:span> — moduł Plasmo scrapujący HTML listy transakcji MetaMask. </text:p>
        </text:list-item>
        <text:list-item>
          <text:p text:style-name="P31"><text:span text:style-name="Strong_20_Emphasis">SIWE</text:span> — Sign-In with Ethereum; logowanie podpisem portfela. </text:p>
        </text:list-item>
        <text:list-item>
          <text:p text:style-name="P32"><text:span text:style-name="Strong_20_Emphasis">JWT</text:span> — JSON Web Token używany do autoryzacji żądań API. </text:p>
        </text:list-item>
      </text:list>
      <text:p text:style-name="Heading_20_1">6. Diagram przypadków użycia (UML)</text:p>
      <text:p text:style-name="P33"><text:span text:style-name="T1">[WSTAW SCREENSHOT]<text:line-break/>Eksport PNG z pliku:<text:line-break/></text:span><text:span text:style-name="Source_20_Text"><text:span text:style-name="T1">docs/University/diagrams/cryptotrack-use-case.drawio</text:span></text:span><text:span text:style-name="T1"><text:line-break/>Otwórz w https://app.diagrams.net → File → Export as → PNG</text:span></text:p>
      <text:p text:style-name="Text_20_body">Diagram obejmuje aktorów: Użytkownik, Rozszerzenie Chrome oraz przypadki: rejestracja, SIWE, synchronizacja, przeglądanie transakcji, kategorie, kategoryzacja AI, analityka, parowanie rozszerzenia.</text:p>
      <text:p text:style-name="Heading_20_1">7. Scenariusze przypadków użycia</text:p>
      <text:h text:style-name="Heading_20_2" text:outline-level="2">7.1. Rejestracja nowego użytkownik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Pole</text:p>
          </table:table-cell>
          <table:table-cell table:style-name="Table1.A1" office:value-type="string">
            <text:p text:style-name="Table_20_Heading">Wartość</text:p>
          </table:table-cell>
        </table:table-row>
        <table:table-row>
          <table:table-cell table:style-name="Table1.A1" office:value-type="string">
            <text:p text:style-name="Table_20_Contents">Nazwa przypadku użycia</text:p>
          </table:table-cell>
          <table:table-cell table:style-name="Table1.A1" office:value-type="string">
            <text:p text:style-name="Table_20_Contents">Rejestracja nowego użytkownika</text:p>
          </table:table-cell>
        </table:table-row>
        <table:table-row>
          <table:table-cell table:style-name="Table1.A1" office:value-type="string">
            <text:p text:style-name="Table_20_Contents">Cel</text:p>
          </table:table-cell>
          <table:table-cell table:style-name="Table1.A1" office:value-type="string">
            <text:p text:style-name="Table_20_Contents">Utworzenie konta w systemie CryptoTrack</text:p>
          </table:table-cell>
        </table:table-row>
        <table:table-row>
          <table:table-cell table:style-name="Table1.A1" office:value-type="string">
            <text:p text:style-name="Table_20_Contents">Warunki wstępne</text:p>
          </table:table-cell>
          <table:table-cell table:style-name="Table1.A1" office:value-type="string">
            <text:p text:style-name="Table_20_Contents">Użytkownik nie jest zalogowany; e-mail nie jest zajęty</text:p>
          </table:table-cell>
        </table:table-row>
        <table:table-row>
          <table:table-cell table:style-name="Table1.A1" office:value-type="string">
            <text:p text:style-name="Table_20_Contents">Warunek pomyślnego zakończenia</text:p>
          </table:table-cell>
          <table:table-cell table:style-name="Table1.A1" office:value-type="string">
            <text:p text:style-name="Table_20_Contents">Konto utworzone, możliwe logowanie</text:p>
          </table:table-cell>
        </table:table-row>
        <table:table-row>
          <table:table-cell table:style-name="Table1.A1" office:value-type="string">
            <text:p text:style-name="Table_20_Contents">Stan końcowy — niepowodzenie</text:p>
          </table:table-cell>
          <table:table-cell table:style-name="Table1.A1" office:value-type="string">
            <text:p text:style-name="Table_20_Contents">Komunikat błędu (np. zajęty e-mail, słabe hasło)</text:p>
          </table:table-cell>
        </table:table-row>
        <table:table-row>
          <table:table-cell table:style-name="Table1.A1" office:value-type="string">
            <text:p text:style-name="Table_20_Contents">Główni aktorzy</text:p>
          </table:table-cell>
          <table:table-cell table:style-name="Table1.A1" office:value-type="string">
            <text:p text:style-name="Table_20_Contents">Użytkownik</text:p>
          </table:table-cell>
        </table:table-row>
        <table:table-row>
          <table:table-cell table:style-name="Table1.A1" office:value-type="string">
            <text:p text:style-name="Table_20_Contents">Wywołanie</text:p>
          </table:table-cell>
          <table:table-cell table:style-name="Table1.A1" office:value-type="string">
            <text:p text:style-name="Table_20_Contents">Wejście na /auth/login → „Zarejestruj się”</text:p>
          </table:table-cell>
        </table:table-row>
      </table:table>
      <text:p text:style-name="Text_20_body"><text:span text:style-name="Strong_20_Emphasis">Główny przepływ:</text:span></text:p>
      <text:list text:style-name="L17">
        <text:list-item>
          <text:p text:style-name="P34">Użytkownik otwiera formularz rejestracji. </text:p>
        </text:list-item>
        <text:list-item>
          <text:p text:style-name="P34">Wprowadza e-mail, hasło, opcjonalnie nazwę wyświetlaną. </text:p>
        </text:list-item>
        <text:list-item>
          <text:p text:style-name="P34">System waliduje dane i zapisuje użytkownika w tabeli <text:span text:style-name="Source_20_Text">users</text:span>. </text:p>
        </text:list-item>
        <text:list-item>
          <text:p text:style-name="P35">Użytkownik zostaje przekierowany do logowania lub automatycznie otrzymuje tokeny. </text:p>
        </text:list-item>
      </text:list>
      <text:h text:style-name="Heading_20_2" text:outline-level="2">7.2. Parowanie rozszerzenia Chrome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Pole</text:p>
          </table:table-cell>
          <table:table-cell table:style-name="Table2.A1" office:value-type="string">
            <text:p text:style-name="Table_20_Heading">Wartość</text:p>
          </table:table-cell>
        </table:table-row>
        <table:table-row>
          <table:table-cell table:style-name="Table2.A1" office:value-type="string">
            <text:p text:style-name="Table_20_Contents">Nazwa przypadku użycia</text:p>
          </table:table-cell>
          <table:table-cell table:style-name="Table2.A1" office:value-type="string">
            <text:p text:style-name="Table_20_Contents">Parowanie rozszerzenia</text:p>
          </table:table-cell>
        </table:table-row>
        <table:table-row>
          <table:table-cell table:style-name="Table2.A1" office:value-type="string">
            <text:p text:style-name="Table_20_Contents">Cel</text:p>
          </table:table-cell>
          <table:table-cell table:style-name="Table2.A1" office:value-type="string">
            <text:p text:style-name="Table_20_Contents">Powiązanie rozszerzenia z kontem użytkownika</text:p>
          </table:table-cell>
        </table:table-row>
        <table:table-row>
          <table:table-cell table:style-name="Table2.A1" office:value-type="string">
            <text:p text:style-name="Table_20_Contents">Warunki wstępne</text:p>
          </table:table-cell>
          <table:table-cell table:style-name="Table2.A1" office:value-type="string">
            <text:p text:style-name="Table_20_Contents">Użytkownik zalogowany w aplikacji web</text:p>
          </table:table-cell>
        </table:table-row>
        <table:table-row>
          <table:table-cell table:style-name="Table2.A1" office:value-type="string">
            <text:p text:style-name="Table_20_Contents">Warunek pomyślnego zakończenia</text:p>
          </table:table-cell>
          <table:table-cell table:style-name="Table2.A1" office:value-type="string">
            <text:p text:style-name="Table_20_Contents">Token rozszerzenia zapisany w chrome.storage</text:p>
          </table:table-cell>
        </table:table-row>
      </table:table>
      <text:p text:style-name="Text_20_body"><text:span text:style-name="Strong_20_Emphasis">Główny przepływ:</text:span></text:p>
      <text:list text:style-name="L18">
        <text:list-item>
          <text:p text:style-name="P36">W Settings użytkownik generuje 6-cyfrowy kod parowania. </text:p>
        </text:list-item>
        <text:list-item>
          <text:p text:style-name="P36">W popup rozszerzenia wpisuje kod i klika Connect. </text:p>
        </text:list-item>
        <text:list-item>
          <text:p text:style-name="P37">API weryfikuje kod (<text:span text:style-name="Source_20_Text">POST /auth/extension/pair</text:span>) i zwraca bearer token. </text:p>
        </text:list-item>
      </text:list>
      <text:h text:style-name="Heading_20_2" text:outline-level="2">7.3. Synchronizacja transakcji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Pole</text:p>
          </table:table-cell>
          <table:table-cell table:style-name="Table3.A1" office:value-type="string">
            <text:p text:style-name="Table_20_Heading">Wartość</text:p>
          </table:table-cell>
        </table:table-row>
        <table:table-row>
          <table:table-cell table:style-name="Table3.A1" office:value-type="string">
            <text:p text:style-name="Table_20_Contents">Nazwa przypadku użycia</text:p>
          </table:table-cell>
          <table:table-cell table:style-name="Table3.A1" office:value-type="string">
            <text:p text:style-name="Table_20_Contents">Synchronizacja transakcji karty</text:p>
          </table:table-cell>
        </table:table-row>
        <table:table-row>
          <table:table-cell table:style-name="Table3.A1" office:value-type="string">
            <text:p text:style-name="Table_20_Contents">Warunki wstępne</text:p>
          </table:table-cell>
          <table:table-cell table:style-name="Table3.A1" office:value-type="string">
            <text:p text:style-name="Table_20_Contents">Rozszerzenie sparowane; otwarta karta MetaMask w przeglądarce</text:p>
          </table:table-cell>
        </table:table-row>
        <table:table-row>
          <table:table-cell table:style-name="Table3.A1" office:value-type="string">
            <text:p text:style-name="Table_20_Contents">Warunek pomyślnego zakończenia</text:p>
          </table:table-cell>
          <table:table-cell table:style-name="Table3.A1" office:value-type="string">
            <text:p text:style-name="Table_20_Contents">Transakcje widoczne w /transactions</text:p>
          </table:table-cell>
        </table:table-row>
      </table:table>
      <text:list text:style-name="L19">
        <text:list-item>
          <text:p text:style-name="P38">Użytkownik otwiera card.metamask.io i klika „Sync now” w rozszerzeniu. </text:p>
        </text:list-item>
        <text:list-item>
          <text:p text:style-name="P38">Content script scrapuje wiersze tabeli transakcji. </text:p>
        </text:list-item>
        <text:list-item>
          <text:p text:style-name="P38">Background normalizuje dane i wysyła POST sync z tokenem. </text:p>
        </text:list-item>
        <text:list-item>
          <text:p text:style-name="P39">API wykonuje upsert w tabeli <text:span text:style-name="Source_20_Text">transactions</text:span>. </text:p>
        </text:list-item>
      </text:list>
      <text:h text:style-name="Heading_20_2" text:outline-level="2">7.4. Automatyczna kategoryzacja wydatków</text:h>
      <text:list text:style-name="L20">
        <text:list-item>
          <text:p text:style-name="P40">Użytkownik wchodzi w Categories → Categorize spendings. </text:p>
        </text:list-item>
        <text:list-item>
          <text:p text:style-name="P40">System skanuje nieprzypisane merchanty; najpierw dopasowuje z CardMerchantMemory. </text:p>
        </text:list-item>
        <text:list-item>
          <text:p text:style-name="P40">Pozostałe merchanty kierowane do OpenAI; wynik zapisywany i uczy pamięci. </text:p>
        </text:list-item>
        <text:list-item>
          <text:p text:style-name="P41">Użytkownik widzi postęp w CardCategorizationRun. </text:p>
        </text:list-item>
      </text:list>
      <text:h text:style-name="Heading_20_2" text:outline-level="2">7.5. Przeglądanie analityki</text:h>
      <text:list text:style-name="L21">
        <text:list-item>
          <text:p text:style-name="P42">Użytkownik otwiera /analytics. </text:p>
        </text:list-item>
        <text:list-item>
          <text:p text:style-name="P42">Wybiera zakres dat. </text:p>
        </text:list-item>
        <text:list-item>
          <text:p text:style-name="P43">API zwraca agregaty; frontend renderuje wykresy (Recharts). </text:p>
        </text:list-item>
      </text:list>
      <text:p text:style-name="Heading_20_1">8. Diagramy czynności (UML)</text:p>
      <text:p text:style-name="P44">[WSTAW SCREENSHOT 8.1]<text:line-break/>Diagram czynności: Rejestracja użytkownika<text:line-break/>(narysuj w draw.io: Start → Formularz → Walidacja → [błąd|zapis DB] → Koniec)</text:p>
      <text:p text:style-name="P44">[WSTAW SCREENSHOT 8.2]<text:line-break/>Diagram czynności: Parowanie rozszerzenia</text:p>
      <text:p text:style-name="P44">[WSTAW SCREENSHOT 8.3]<text:line-break/>Diagram czynności: Synchronizacja transakcji</text:p>
      <text:p text:style-name="P44">[WSTAW SCREENSHOT 8.4]<text:line-break/>Diagram czynności: Automatyczna kategoryzacja (AI)</text:p>
      <text:p text:style-name="Heading_20_1">9. Diagram ERD</text:p>
      <text:p text:style-name="P33"><text:span text:style-name="T1">[WSTAW SCREENSHOT]<text:line-break/>Eksport z: </text:span><text:span text:style-name="Source_20_Text"><text:span text:style-name="T1">docs/University/diagrams/cryptotrack-erd.drawio</text:span></text:span></text:p>
      <text:p text:style-name="Heading_20_1">10. Diagram klas (UML)</text:p>
      <text:p text:style-name="P44">[WSTAW SCREENSHOT]<text:line-break/>Klasy domenowe: User, Transaction, Category, CardMerchantMemory, CardCategorizationRun, ExtensionToken, PortfolioAccount — powiązania 1:N i FK jak w Prisma schema</text:p>
      <text:p text:style-name="Heading_20_1">11. Diagram sekwencji (UML)</text:p>
      <text:p text:style-name="P44">[WSTAW SCREENSHOT]<text:line-break/>Sekwencja: Użytkownik → Rozszerzenie → API → PostgreSQL przy synchronizacji (Sync now)</text:p>
      <text:p text:style-name="Heading_20_1">12. Diagram stanów (UML)</text:p>
      <text:p text:style-name="P44">[WSTAW SCREENSHOT]<text:line-break/>Stany transakcji karty: PENDING → SETTLED | DECLINED | REFUNDED</text:p>
      <text:p text:style-name="P44">[WSTAW SCREENSHOT]<text:line-break/>Stany CardCategorizationRun: QUEUED → RUNNING → COMPLETED | FAILED | PARTIAL</text:p>
      <text:p text:style-name="Heading_20_1">13. Diagram komponentów i wdrożenia (UML)</text:p>
      <text:p text:style-name="P33"><text:span text:style-name="T1">[WSTAW SCREENSHOT]<text:line-break/>Eksport z: </text:span><text:span text:style-name="Source_20_Text"><text:span text:style-name="T1">docs/University/diagrams/cryptotrack-deployment.drawio</text:span></text:span></text:p>
      <text:p text:style-name="Heading_20_1">14. Plan procesu testowania</text:p>
      <text:h text:style-name="Heading_20_2" text:outline-level="2">14.1. Testy automatyczne</text:h>
      <text:list text:style-name="L22">
        <text:list-item>
          <text:p text:style-name="P45"><text:span text:style-name="Strong_20_Emphasis">Testy jednostkowe</text:span> — Jest: <text:span text:style-name="Source_20_Text">card-transactions.service.spec.ts</text:span>, <text:span text:style-name="Source_20_Text">card-merchant-auto-categorize.spec.ts</text:span>. </text:p>
        </text:list-item>
        <text:list-item>
          <text:p text:style-name="P46"><text:span text:style-name="Strong_20_Emphasis">Testy integracyjne</text:span> — (planowane) endpointy auth i sync z testową bazą. </text:p>
        </text:list-item>
      </text:list>
      <text:h text:style-name="Heading_20_2" text:outline-level="2">14.2. Testy manualne</text:h>
      <text:p text:style-name="Text_20_body">Scenariusze opisane w rozdziale 19 — wykonywane przez testera na środowisku dev (web + API + rozszerzenie).</text:p>
      <text:h text:style-name="Heading_20_2" text:outline-level="2">14.3. Utrzymanie</text:h>
      <text:p text:style-name="Text_20_body">Po wdrożeniu: raportowanie błędów, poprawki w kolejnych wersjach, migracje Prisma.</text:p>
      <text:p text:style-name="Heading_20_1">15. Raport z analizy rynku</text:p>
      <text:h text:style-name="Heading_20_2" text:outline-level="2">15.1. Funkcje kluczowe CryptoTrack</text:h>
      <text:list text:style-name="L23">
        <text:list-item>
          <text:p text:style-name="P47">Specjalizacja w MetaMask Card (nie ogólny eksplorator blockchain). </text:p>
        </text:list-item>
        <text:list-item>
          <text:p text:style-name="P47">Kategoryzacja wydatków z AI i pamięcią merchantów. </text:p>
        </text:list-item>
        <text:list-item>
          <text:p text:style-name="P48">Rozszerzenie do synchronizacji bez ręcznego importu CSV. </text:p>
        </text:list-item>
      </text:list>
      <text:h text:style-name="Heading_20_2" text:outline-level="2">15.2. Porównanie z konkurencją</text:h>
      <text:p text:style-name="Text_20_body"><text:span text:style-name="Strong_20_Emphasis">❖ Koinly / CoinTracker</text:span></text:p>
      <text:list text:style-name="L24">
        <text:list-item>
          <text:p text:style-name="P49">Zalety: szerokie wsparcie podatków i wielu giełd. </text:p>
        </text:list-item>
        <text:list-item>
          <text:p text:style-name="P50">Wady: mniej nastawione na codzienne wydatki kartą DeFi; wyższy próg wejścia. </text:p>
        </text:list-item>
      </text:list>
      <text:p text:style-name="Text_20_body"><text:span text:style-name="Strong_20_Emphasis">❖ Rotki</text:span></text:p>
      <text:list text:style-name="L25">
        <text:list-item>
          <text:p text:style-name="P51">Zalety: open source, lokalna kontrola danych. </text:p>
        </text:list-item>
        <text:list-item>
          <text:p text:style-name="P52">Wady: wymaga ręcznej konfiguracji; brak dedykowanego flow MetaMask Card. </text:p>
        </text:list-item>
      </text:list>
      <text:p text:style-name="Text_20_body"><text:span text:style-name="Strong_20_Emphasis">❖ Aplikacje bankowe tradycyjne</text:span></text:p>
      <text:list text:style-name="L26">
        <text:list-item>
          <text:p text:style-name="P53">Zalety: gotowa kategoryzacja i UX. </text:p>
        </text:list-item>
        <text:list-item>
          <text:p text:style-name="P54">Wady: nie obejmują wydatków kartą krypto MetaMask. </text:p>
        </text:list-item>
      </text:list>
      <text:h text:style-name="Heading_20_2" text:outline-level="2">15.3. Podsumowanie</text:h>
      <text:p text:style-name="Text_20_body">CryptoTrack wypełnia niszę „expense tracker dla MetaMask Card”. Wybór narzędzia zależy od tego, czy użytkownik potrzebuje raportów podatkowych on-chain, czy przejrzystego budżetu kartowej.</text:p>
      <text:p text:style-name="Heading_20_1">16. Struktura bazy danych</text:p>
      <text:h text:style-name="Heading_20_2" text:outline-level="2">16.1. Model koncepcyjny</text:h>
      <text:p text:style-name="P44">[WSTAW SCREENSHOT]<text:line-break/>Ten sam co diagram ERD (rozdz. 9) lub uproszczony model koncepcyjny bez typów SQL</text:p>
      <text:h text:style-name="Heading_20_2" text:outline-level="2">16.2. Model logiczny</text:h>
      <text:p text:style-name="Text_20_body">Encje: User (1) — (N) Transaction, Category, Session, ExtensionToken, CardMerchantMemory, CardCategorizationRun; User (1) — (1) PortfolioAccount; Category (1) — (N) SubCategory (self-reference parentId).</text:p>
      <text:h text:style-name="Heading_20_2" text:outline-level="2">16.3. Model fizyczny</text:h>
      <text:p text:style-name="Text_20_body">PostgreSQL; ORM Prisma; tabele: users, sessions, transactions, categories, card_merchant_memory, card_categorization_runs, extension_tokens, portfolio_accounts.</text:p>
      <text:p text:style-name="Heading_20_1">17. Dokumentacja bezpieczeństwa</text:p>
      <text:h text:style-name="Heading_20_2" text:outline-level="2">17.1. Szyfrowanie w tranzycie</text:h>
      <text:p text:style-name="Text_20_body">HTTPS (TLS 1.2+) między przeglądarką a API w produkcji.</text:p>
      <text:h text:style-name="Heading_20_2" text:outline-level="2">17.2. Szyfrowanie w spoczynku</text:h>
      <text:p text:style-name="Text_20_body">Hasła: bcrypt hash. Tokeny rozszerzenia i refresh: przechowywane jako hash w bazie. Szyfrowanie dysku — zależne od dostawcy hostingu PostgreSQL.</text:p>
      <text:h text:style-name="Heading_20_2" text:outline-level="2">17.3. Uwierzytelnianie</text:h>
      <text:p text:style-name="Text_20_body">JWT access + refresh token w tabeli sessions; opcjonalnie SIWE dla portfela Ethereum.</text:p>
      <text:h text:style-name="Heading_20_2" text:outline-level="2">17.4. Ochrona przed atakami</text:h>
      <text:list text:style-name="L27">
        <text:list-item>
          <text:p text:style-name="P55">Walidacja wejścia (DTO, class-validator) — ochrona przed injection. </text:p>
        </text:list-item>
        <text:list-item>
          <text:p text:style-name="P55">Prisma parameterized queries — ochrona przed SQL injection. </text:p>
        </text:list-item>
        <text:list-item>
          <text:p text:style-name="P56">Rate limiting (planowane na produkcji). </text:p>
        </text:list-item>
      </text:list>
      <text:h text:style-name="Heading_20_2" text:outline-level="2">17.5. Uprawnienia</text:h>
      <text:p text:style-name="Text_20_body">Model single-tenant: każdy użytkownik widzi wyłącznie swoje transakcje (<text:span text:style-name="Source_20_Text">userId</text:span> w każdym zapytaniu).</text:p>
      <text:p text:style-name="Heading_20_1">18. Kod SQL (PostgreSQL)</text:p>
      <text:p text:style-name="Text_20_body">Poniżej fragment schematu wygenerowanego przez Prisma Migrate (dialekt PostgreSQL).</text:p>
      <text:p text:style-name="Preformatted_20_Text">CREATE TABLE "users" (</text:p>
      <text:p text:style-name="Preformatted_20_Text"><text:s text:c="4"/>"id" TEXT NOT NULL,</text:p>
      <text:p text:style-name="Preformatted_20_Text"><text:s text:c="4"/>"email" TEXT NOT NULL,</text:p>
      <text:p text:style-name="Preformatted_20_Text"><text:s text:c="4"/>"passwordHash" TEXT,</text:p>
      <text:p text:style-name="Preformatted_20_Text"><text:s text:c="4"/>"displayName" TEXT,</text:p>
      <text:p text:style-name="Preformatted_20_Text"><text:s text:c="4"/>"createdAt" TIMESTAMP(3) NOT NULL DEFAULT CURRENT_TIMESTAMP,</text:p>
      <text:p text:style-name="Preformatted_20_Text"><text:s text:c="4"/>"updatedAt" TIMESTAMP(3) NOT NULL,</text:p>
      <text:p text:style-name="Preformatted_20_Text"><text:s text:c="4"/>CONSTRAINT "users_pkey" PRIMARY KEY ("id")</text:p>
      <text:p text:style-name="Preformatted_20_Text">);</text:p>
      <text:p text:style-name="Preformatted_20_Text">CREATE UNIQUE INDEX "users_email_key" ON "users"("email");</text:p>
      <text:p text:style-name="Preformatted_20_Text"/>
      <text:p text:style-name="Preformatted_20_Text">CREATE TABLE "transactions" (</text:p>
      <text:p text:style-name="Preformatted_20_Text"><text:s text:c="4"/>"id" TEXT NOT NULL,</text:p>
      <text:p text:style-name="Preformatted_20_Text"><text:s text:c="4"/>"userId" TEXT NOT NULL,</text:p>
      <text:p text:style-name="Preformatted_20_Text"><text:s text:c="4"/>"source" "TransactionSource" NOT NULL DEFAULT 'CARD',</text:p>
      <text:p text:style-name="Preformatted_20_Text"><text:s text:c="4"/>"externalId" TEXT NOT NULL,</text:p>
      <text:p text:style-name="Preformatted_20_Text"><text:s text:c="4"/>"timestamp" TIMESTAMP(3) NOT NULL,</text:p>
      <text:p text:style-name="Preformatted_20_Text"><text:s text:c="4"/>"merchantName" TEXT,</text:p>
      <text:p text:style-name="Preformatted_20_Text"><text:s text:c="4"/>"fiatAmount" DECIMAL(18,2),</text:p>
      <text:p text:style-name="Preformatted_20_Text"><text:s text:c="4"/>"categoryId" TEXT,</text:p>
      <text:p text:style-name="Preformatted_20_Text"><text:s text:c="4"/>"subcategoryId" TEXT,</text:p>
      <text:p text:style-name="Preformatted_20_Text"><text:s text:c="4"/>CONSTRAINT "transactions_pkey" PRIMARY KEY ("id"),</text:p>
      <text:p text:style-name="Preformatted_20_Text"><text:s text:c="4"/>CONSTRAINT "transactions_userId_fkey" FOREIGN KEY ("userId") REFERENCES "users"("id") ON DELETE CASCADE</text:p>
      <text:p text:style-name="Preformatted_20_Text">);</text:p>
      <text:p text:style-name="Preformatted_20_Text">CREATE UNIQUE INDEX "transactions_userId_source_externalId_key"</text:p>
      <text:p text:style-name="P57"><text:s text:c="2"/>ON "transactions"("userId", "source", "externalId");</text:p>
      <text:p text:style-name="Text_20_body">Pełny schemat: <text:span text:style-name="Source_20_Text">packages/db/prisma/schema.prisma</text:span> oraz katalog <text:span text:style-name="Source_20_Text">prisma/migrations/</text:span>.</text:p>
      <text:h text:style-name="Heading_20_2" text:outline-level="2">18.2. Widok przykładowy (PostgreSQL)</text:h>
      <text:p text:style-name="Preformatted_20_Text">CREATE VIEW v_user_spending_by_category AS</text:p>
      <text:p text:style-name="Preformatted_20_Text">SELECT</text:p>
      <text:p text:style-name="Preformatted_20_Text"><text:s text:c="2"/>t."userId",</text:p>
      <text:p text:style-name="Preformatted_20_Text"><text:s text:c="2"/>c.name AS category_name,</text:p>
      <text:p text:style-name="Preformatted_20_Text"><text:s text:c="2"/>DATE_TRUNC('month', t."timestamp") AS month,</text:p>
      <text:p text:style-name="Preformatted_20_Text"><text:s text:c="2"/>SUM(t."fiatAmount") AS total_fiat</text:p>
      <text:p text:style-name="Preformatted_20_Text">FROM transactions t</text:p>
      <text:p text:style-name="Preformatted_20_Text">LEFT JOIN categories c ON c.id = t."categoryId"</text:p>
      <text:p text:style-name="Preformatted_20_Text">WHERE t."fiatAmount" IS NOT NULL</text:p>
      <text:p text:style-name="P57">GROUP BY t."userId", c.name, DATE_TRUNC('month', t."timestamp");</text:p>
      <text:p text:style-name="Heading_20_1">19. Przypadki testowe</text:p>
      <text:h text:style-name="Heading_20_2" text:outline-level="2">19.1. Rejestracja — niespójne hasło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r</text:p>
          </table:table-cell>
          <table:table-cell table:style-name="Table4.A1" office:value-type="string">
            <text:p text:style-name="Table_20_Heading">Krok</text:p>
          </table:table-cell>
          <table:table-cell table:style-name="Table4.A1" office:value-type="string">
            <text:p text:style-name="Table_20_Heading">Rezultat</text:p>
          </table:table-cell>
        </table:table-row>
        <table:table-row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Otwórz /auth/login → rejestracja</text:p>
          </table:table-cell>
          <table:table-cell table:style-name="Table4.A1" office:value-type="string">
            <text:p text:style-name="Table_20_Contents">Formularz rejestracji</text:p>
          </table:table-cell>
        </table:table-row>
        <table:table-row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Wpisz różne hasła w polach Hasło i Powtórz</text:p>
          </table:table-cell>
          <table:table-cell table:style-name="Table4.A1" office:value-type="string">
            <text:p text:style-name="Table_20_Contents">—</text:p>
          </table:table-cell>
        </table:table-row>
        <table:table-row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Kliknij Zarejestruj</text:p>
          </table:table-cell>
          <table:table-cell table:style-name="Table4.A1" office:value-type="string">
            <text:p text:style-name="Table_20_Contents">Komunikat błędu walidacji; brak konta</text:p>
          </table:table-cell>
        </table:table-row>
      </table:table>
      <text:h text:style-name="Heading_20_2" text:outline-level="2">19.2. Rejestracja — pomyślna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Nr</text:p>
          </table:table-cell>
          <table:table-cell table:style-name="Table5.A1" office:value-type="string">
            <text:p text:style-name="Table_20_Heading">Krok</text:p>
          </table:table-cell>
          <table:table-cell table:style-name="Table5.A1" office:value-type="string">
            <text:p text:style-name="Table_20_Heading">Rezultat</text:p>
          </table:table-cell>
        </table:table-row>
        <table:table-row>
          <table:table-cell table:style-name="Table5.A1" office:value-type="string">
            <text:p text:style-name="Table_20_Contents">1–2</text:p>
          </table:table-cell>
          <table:table-cell table:style-name="Table5.A1" office:value-type="string">
            <text:p text:style-name="Table_20_Contents">Poprawne dane, unikalny e-mail</text:p>
          </table:table-cell>
          <table:table-cell table:style-name="Table5.A1" office:value-type="string">
            <text:p text:style-name="Table_20_Contents">—</text:p>
          </table:table-cell>
        </table:table-row>
        <table:table-row>
          <table:table-cell table:style-name="Table5.A1" office:value-type="string">
            <text:p text:style-name="Table_20_Contents">3</text:p>
          </table:table-cell>
          <table:table-cell table:style-name="Table5.A1" office:value-type="string">
            <text:p text:style-name="Table_20_Contents">Zarejestruj</text:p>
          </table:table-cell>
          <table:table-cell table:style-name="Table5.A1" office:value-type="string">
            <text:p text:style-name="Table_20_Contents">Przekierowanie / możliwość logowania</text:p>
          </table:table-cell>
        </table:table-row>
      </table:table>
      <text:h text:style-name="Heading_20_2" text:outline-level="2">19.3. Synchronizacja bez parowania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Heading">Nr</text:p>
          </table:table-cell>
          <table:table-cell table:style-name="Table6.A1" office:value-type="string">
            <text:p text:style-name="Table_20_Heading">Krok</text:p>
          </table:table-cell>
          <table:table-cell table:style-name="Table6.A1" office:value-type="string">
            <text:p text:style-name="Table_20_Heading">Rezultat</text:p>
          </table:table-cell>
        </table:table-row>
        <table:table-row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Sync now bez tokenu</text:p>
          </table:table-cell>
          <table:table-cell table:style-name="Table6.A1" office:value-type="string">
            <text:p text:style-name="Table_20_Contents">Komunikat błędu w popup rozszerzenia</text:p>
          </table:table-cell>
        </table:table-row>
      </table:table>
      <text:p text:style-name="Heading_20_1">20. Testy jednostkowe</text:p>
      <text:p text:style-name="P33"><text:span text:style-name="T1">[WSTAW SCREENSHOT]<text:line-break/>Wynik: </text:span><text:span text:style-name="Source_20_Text"><text:span text:style-name="T1">pnpm --filter @crypto-tracker/api test</text:span></text:span><text:span text:style-name="T1"> — zielone testy Jest</text:span></text:p>
      <text:p text:style-name="Text_20_body">Testy obejmują m.in. normalizację merchantów i logikę auto-kategoryzacji (<text:span text:style-name="Source_20_Text">card-merchant-auto-categorize.spec.ts</text:span>).</text:p>
      <text:p text:style-name="Heading_20_1">21. Podręcznik użytkownika</text:p>
      <text:p text:style-name="Text_20_body"><text:span text:style-name="Strong_20_Emphasis">Spis treści:</text:span> 1. Rejestracja. 2. Logowanie. 3. Parowanie rozszerzenia. 4. Synchronizacja. 5. Transakcje. 6. Kategorie. 7. Kategoryzacja AI. 8. Analityka. 9. Ustawienia.</text:p>
      <text:h text:style-name="Heading_20_2" text:outline-level="2">21.1. Rejestracja i logowanie</text:h>
      <text:p text:style-name="P33"><text:span text:style-name="T1">[WSTAW SCREENSHOT]<text:line-break/>Strona: </text:span><text:span text:style-name="Source_20_Text"><text:span text:style-name="T1">/auth/login</text:span></text:span><text:span text:style-name="T1"> — formularz logowania i link rejestracji</text:span></text:p>
      <text:h text:style-name="Heading_20_2" text:outline-level="2">21.2. Dashboard</text:h>
      <text:p text:style-name="P33"><text:span text:style-name="T1">[WSTAW SCREENSHOT]<text:line-break/>Strona: </text:span><text:span text:style-name="Source_20_Text"><text:span text:style-name="T1">/dashboard</text:span></text:span><text:span text:style-name="T1"> — podsumowanie, ostatnie transakcje, saldo karty</text:span></text:p>
      <text:h text:style-name="Heading_20_2" text:outline-level="2">21.3. Parowanie rozszerzenia</text:h>
      <text:p text:style-name="P33"><text:span text:style-name="T1">[WSTAW SCREENSHOT 1]<text:line-break/>Web: </text:span><text:span text:style-name="Source_20_Text"><text:span text:style-name="T1">/settings</text:span></text:span><text:span text:style-name="T1"> — sekcja Extension pairing, wygenerowany kod 6-cyfrowy</text:span></text:p>
      <text:p text:style-name="P44">[WSTAW SCREENSHOT 2]<text:line-break/>Chrome: popup rozszerzenia CryptoTrack — pole kodu, przycisk Connect</text:p>
      <text:h text:style-name="Heading_20_2" text:outline-level="2">21.4. Synchronizacja transakcji</text:h>
      <text:p text:style-name="P44">[WSTAW SCREENSHOT 1]<text:line-break/>Karta: card.metamask.io — lista transakcji (zakładka Card)</text:p>
      <text:p text:style-name="P44">[WSTAW SCREENSHOT 2]<text:line-break/>Popup rozszerzenia — przycisk „Sync now”, komunikat sukcesu</text:p>
      <text:h text:style-name="Heading_20_2" text:outline-level="2">21.5. Lista transakcji</text:h>
      <text:p text:style-name="P33"><text:span text:style-name="T1">[WSTAW SCREENSHOT]<text:line-break/>Strona: </text:span><text:span text:style-name="Source_20_Text"><text:span text:style-name="T1">/transactions</text:span></text:span><text:span text:style-name="T1"> — tabela z merchantami, kwotami, badge kategorii, filtry dat</text:span></text:p>
      <text:h text:style-name="Heading_20_2" text:outline-level="2">21.6. Zarządzanie kategoriami</text:h>
      <text:p text:style-name="P33"><text:span text:style-name="T1">[WSTAW SCREENSHOT]<text:line-break/>Strona: </text:span><text:span text:style-name="Source_20_Text"><text:span text:style-name="T1">/categories</text:span></text:span><text:span text:style-name="T1"> — drzewo kategorii, dodawanie/edycja, kolory</text:span></text:p>
      <text:h text:style-name="Heading_20_2" text:outline-level="2">21.7. Masowa kategoryzacja</text:h>
      <text:p text:style-name="P33"><text:span text:style-name="T1">[WSTAW SCREENSHOT]<text:line-break/>Strona: </text:span><text:span text:style-name="Source_20_Text"><text:span text:style-name="T1">/categories/categorize</text:span></text:span><text:span text:style-name="T1"> — lista merchantów, przycisk auto-categorize, postęp</text:span></text:p>
      <text:h text:style-name="Heading_20_2" text:outline-level="2">21.8. Analityka</text:h>
      <text:p text:style-name="P33"><text:span text:style-name="T1">[WSTAW SCREENSHOT]<text:line-break/>Strona: </text:span><text:span text:style-name="Source_20_Text"><text:span text:style-name="T1">/analytics</text:span></text:span><text:span text:style-name="T1"> — wykresy wydatków, porównanie okresów, wybór zakresu dat</text:span></text:p>
      <text:h text:style-name="Heading_20_2" text:outline-level="2">21.9. Edycja transakcji (kategoria)</text:h>
      <text:p text:style-name="P33"><text:span text:style-name="T1">[WSTAW SCREENSHOT]<text:line-break/>Strona: </text:span><text:span text:style-name="Source_20_Text"><text:span text:style-name="T1">/transactions</text:span></text:span><text:span text:style-name="T1"> — otwarty dialog/sheet edycji pojedynczej transakcji z wyborem kategorii</text:span></text:p>
      <text:p text:style-name="Heading_20_1">Stos technologiczny (podsumowanie)</text:p>
      <text:p text:style-name="Text_20_body">TypeScript, React 19, Next.js 15, Tailwind CSS, NestJS, Fastify, PostgreSQL, Prisma, JWT, SIWE, REST API, rozszerzenie Chrome (Plasmo), OpenAI API, Docker, pnpm, Turbo.</text:p>
      <text:p text:style-name="Heading_20_1">Repozytorium</text:p>
      <text:p text:style-name="Text_20_body">GitHub: [wstaw link do repozytorium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, serif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874in" fo:margin-right="0.7874in" fo:margin-top="0.7874in" fo:margin-bottom="0.7874in" style:contextual-spacing="false" fo:line-height="135%"/>
      <style:text-properties style:font-name="Liberation Serif1" fo:font-family="'Liberation Serif', 'Times New Roman', serif" fo:font-size="12pt" style:font-name-asian="Liberation Serif1" style:font-family-asian="'Liberation Serif', 'Times New Roman', serif" style:font-size-asian="12pt" style:font-name-complex="Liberation Serif1" style:font-family-complex="'Liberation Serif', 'Times New Roman', serif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ing_20_1" style:display-name="Heading 1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chapter" style:master-page-name="">
      <style:paragraph-properties fo:margin-top="0.139in" fo:margin-bottom="0.0835in" style:contextual-spacing="false" style:page-number="auto" fo:break-before="auto" fo:break-after="auto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.7874in" fo:margin-bottom="0in" style:contextual-spacing="false" fo:padding="0in" fo:border="none"/>
      <style:text-properties style:font-name="Liberation Mono" fo:font-family="'Liberation Mono', monospace" fo:font-size="9pt" style:font-name-asian="Liberation Mono" style:font-family-asian="'Liberation Mono', monospace" style:font-size-asian="9pt" style:font-name-complex="Liberation Mono" style:font-family-complex="'Liberation Mono', monospace" style:font-size-complex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, monospace" fo:font-size="9pt" fo:background-color="#f4f4f4" style:font-name-asian="Liberation Mono" style:font-family-asian="'Liberation Mono', monospace" style:font-size-asian="9pt" style:font-name-complex="Liberation Mono" style:font-family-complex="'Liberation Mono', monospace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ryptoTrack — dokumentacja projektu</dc:title>
    <meta:document-statistic meta:table-count="6" meta:image-count="0" meta:object-count="0" meta:page-count="1" meta:paragraph-count="308" meta:word-count="1902" meta:character-count="15379" meta:non-whitespace-character-count="13663"/>
    <meta:generator>LibreOffice/25.8.7.2$Linux_X86_64 LibreOffice_project/580$Build-2</meta:generator>
    <meta:user-defined meta:name=""/>
  </office:meta>
</office:document-meta>
</file>